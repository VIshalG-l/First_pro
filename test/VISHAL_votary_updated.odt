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top="0cm" fo:margin-bottom="0cm" loext:contextual-spacing="false"/>
    </style:style>
    <style:style style:name="P2" style:family="paragraph" style:parent-style-name="Standard" style:list-style-name="WWNum2">
      <style:paragraph-properties fo:margin-top="0cm" fo:margin-bottom="0cm" loext:contextual-spacing="false"/>
    </style:style>
    <style:style style:name="P3" style:family="paragraph" style:parent-style-name="Standard" style:list-style-name="WWNum3">
      <style:paragraph-properties fo:margin-top="0cm" fo:margin-bottom="0cm" loext:contextual-spacing="false"/>
    </style:style>
    <style:style style:name="P4" style:family="paragraph" style:parent-style-name="Standard" style:list-style-name="WWNum4">
      <style:paragraph-properties fo:margin-top="0cm" fo:margin-bottom="0cm" loext:contextual-spacing="false"/>
    </style:style>
    <style:style style:name="P5" style:family="paragraph" style:parent-style-name="Standard" style:list-style-name="WWNum5">
      <style:paragraph-properties fo:margin-top="0cm" fo:margin-bottom="0cm" loext:contextual-spacing="false"/>
    </style:style>
    <style:style style:name="P6" style:family="paragraph" style:parent-style-name="Standard" style:list-style-name="WWNum9">
      <style:paragraph-properties fo:margin-top="0cm" fo:margin-bottom="0cm" loext:contextual-spacing="false"/>
    </style:style>
    <style:style style:name="P7" style:family="paragraph" style:parent-style-name="Standard" style:list-style-name="">
      <style:paragraph-properties fo:margin-top="0.494cm" fo:margin-bottom="0.494cm" loext:contextual-spacing="false"/>
    </style:style>
    <style:style style:name="P8" style:family="paragraph" style:parent-style-name="Standard">
      <style:paragraph-properties fo:margin-top="0.494cm" fo:margin-bottom="0.494cm" loext:contextual-spacing="false"/>
    </style:style>
    <style:style style:name="P9" style:family="paragraph" style:parent-style-name="Standard" style:list-style-name="WWNum1">
      <style:paragraph-properties fo:margin-top="0.494cm" fo:margin-bottom="0cm" loext:contextual-spacing="false"/>
    </style:style>
    <style:style style:name="P10" style:family="paragraph" style:parent-style-name="Standard" style:list-style-name="WWNum2">
      <style:paragraph-properties fo:margin-top="0.494cm" fo:margin-bottom="0cm" loext:contextual-spacing="false"/>
    </style:style>
    <style:style style:name="P11" style:family="paragraph" style:parent-style-name="Standard" style:list-style-name="WWNum3">
      <style:paragraph-properties fo:margin-top="0.494cm" fo:margin-bottom="0cm" loext:contextual-spacing="false"/>
    </style:style>
    <style:style style:name="P12" style:family="paragraph" style:parent-style-name="Standard" style:list-style-name="WWNum4">
      <style:paragraph-properties fo:margin-top="0.494cm" fo:margin-bottom="0cm" loext:contextual-spacing="false"/>
    </style:style>
    <style:style style:name="P13" style:family="paragraph" style:parent-style-name="Standard" style:list-style-name="WWNum5">
      <style:paragraph-properties fo:margin-top="0.494cm" fo:margin-bottom="0cm" loext:contextual-spacing="false"/>
    </style:style>
    <style:style style:name="P14" style:family="paragraph" style:parent-style-name="Standard" style:list-style-name="WWNum8">
      <style:paragraph-properties fo:margin-top="0.494cm" fo:margin-bottom="0cm" loext:contextual-spacing="false"/>
    </style:style>
    <style:style style:name="P15" style:family="paragraph" style:parent-style-name="Standard" style:list-style-name="WWNum9">
      <style:paragraph-properties fo:margin-top="0.494cm" fo:margin-bottom="0cm" loext:contextual-spacing="false"/>
    </style:style>
    <style:style style:name="P16" style:family="paragraph" style:parent-style-name="Standard" style:list-style-name="WWNum10">
      <style:paragraph-properties fo:margin-top="0.494cm" fo:margin-bottom="0cm" loext:contextual-spacing="false"/>
    </style:style>
    <style:style style:name="P17" style:family="paragraph" style:parent-style-name="Standard" style:list-style-name="WWNum1">
      <style:paragraph-properties fo:margin-top="0cm" fo:margin-bottom="0.494cm" loext:contextual-spacing="false"/>
    </style:style>
    <style:style style:name="P18" style:family="paragraph" style:parent-style-name="Standard" style:list-style-name="WWNum2">
      <style:paragraph-properties fo:margin-top="0cm" fo:margin-bottom="0.494cm" loext:contextual-spacing="false"/>
      <style:text-properties officeooo:paragraph-rsid="000a928c"/>
    </style:style>
    <style:style style:name="P19" style:family="paragraph" style:parent-style-name="Standard" style:list-style-name="WWNum3">
      <style:paragraph-properties fo:margin-top="0cm" fo:margin-bottom="0.494cm" loext:contextual-spacing="false"/>
    </style:style>
    <style:style style:name="P20" style:family="paragraph" style:parent-style-name="Standard" style:list-style-name="WWNum4">
      <style:paragraph-properties fo:margin-top="0cm" fo:margin-bottom="0.494cm" loext:contextual-spacing="false"/>
    </style:style>
    <style:style style:name="P21" style:family="paragraph" style:parent-style-name="Standard" style:list-style-name="WWNum5">
      <style:paragraph-properties fo:margin-top="0cm" fo:margin-bottom="0.494cm" loext:contextual-spacing="false"/>
    </style:style>
    <style:style style:name="P22" style:family="paragraph" style:parent-style-name="Standard" style:list-style-name="WWNum8">
      <style:paragraph-properties fo:margin-top="0cm" fo:margin-bottom="0.494cm" loext:contextual-spacing="false"/>
    </style:style>
    <style:style style:name="P23" style:family="paragraph" style:parent-style-name="Standard" style:list-style-name="WWNum9">
      <style:paragraph-properties fo:margin-top="0cm" fo:margin-bottom="0.494cm" loext:contextual-spacing="false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Calibri Light" fo:font-weight="bold" style:font-weight-asian="bold" style:font-weight-complex="bold"/>
    </style:style>
    <style:style style:name="T2" style:family="text">
      <style:text-properties style:font-name="Calibri Light" fo:font-weight="bold" style:font-name-asian="Times New Roman1" style:font-weight-asian="bold" style:font-weight-complex="bold"/>
    </style:style>
    <style:style style:name="T3" style:family="text">
      <style:text-properties style:font-name="Calibri Light" style:font-name-asian="Times New Roman1"/>
    </style:style>
    <style:style style:name="T4" style:family="text">
      <style:text-properties style:font-name="Calibri Light" fo:font-size="14pt" fo:font-weight="bold" style:font-name-asian="Times New Roman1" style:font-size-asian="14pt" style:font-weight-asian="bold" style:font-size-complex="14pt" style:font-weight-complex="bold"/>
    </style:style>
    <style:style style:name="T5" style:family="text">
      <style:text-properties style:font-name="Calibri Light" fo:font-style="italic" style:font-name-asian="Times New Roman1" style:font-style-asian="italic" style:font-style-complex="italic"/>
    </style:style>
    <style:style style:name="T6" style:family="text">
      <style:text-properties style:font-name="Segoe UI Symbol" fo:font-weight="bold" style:font-weight-asian="bold" style:font-name-complex="Segoe UI Symbol1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 text:name="_top"/><text:span text:style-name="T1">VISHAL GOUD UDUTHALA</text:span></text:p>
      <text:p text:style-name="Standard"><text:span text:style-name="T6">📧</text:span><text:span text:style-name="T1"> </text:span><text:a xlink:type="simple" xlink:href="#_top" text:style-name="Internet_20_link" text:visited-style-name="Visited_20_Internet_20_Link"><text:span text:style-name="T1">vg0670238@gmail.com</text:span></text:a><text:span text:style-name="T1"> | </text:span><text:span text:style-name="T6">📞</text:span><text:span text:style-name="T1"> +91 7842800302 | </text:span><text:a xlink:type="simple" xlink:href="#_top" text:style-name="Internet_20_link" text:visited-style-name="Visited_20_Internet_20_Link"><text:span text:style-name="T1">linkedin.com/in/vishal-goud-675072225</text:span></text:a></text:p>
      <text:p text:style-name="Standard"><draw:rect text:anchor-type="as-char" style:rel-width="100%" draw:z-index="0" draw:name="1026" draw:style-name="gr1" draw:text-style-name="P25" svg:width="19.051cm" svg:height="0.054cm"><text:p/></draw:rect></text:p>
      <text:h text:style-name="P7" text:outline-level="2"><text:span text:style-name="T4">PROFESSIONAL SUMMARY</text:span></text:h>
      <text:p text:style-name="P8"><text:span text:style-name="T3">Results-driven Embedded Firmware Engineer with 2+ years of experience in real-time embedded software development, </text:span><text:span text:style-name="Strong_20_Emphasis"><text:span text:style-name="T3">build &amp; integration</text:span></text:span><text:span text:style-name="T3">, system integration, and industrial automation solutions. Strong expertise in C development, multi-threading, and debugging, with proven ability to integrate complex hardware–software systems. Adept at troubleshooting runtime and build issues, collaborating across teams, and delivering high-performance embedded solutions on STM32, Raspberry Pi, Toradex SoM, and LPC platforms.</text:span></text:p>
      <text:p text:style-name="Standard"><draw:rect text:anchor-type="as-char" style:rel-width="100%" draw:z-index="1" draw:style-name="gr1" draw:text-style-name="P25" svg:width="19.051cm" svg:height="0.054cm"><text:p/></draw:rect></text:p>
      <text:h text:style-name="P7" text:outline-level="2"><text:span text:style-name="T4">PROFESSIONAL EXPERIENCE</text:span></text:h>
      <text:p text:style-name="P8"><text:span text:style-name="T2">Software Engineer</text:span><text:span text:style-name="T3"><text:line-break/></text:span><text:span text:style-name="T2">VotaryTech, Hyderabad</text:span><text:span text:style-name="T3"> | Mar 2026 – Present</text:span></text:p>
      <text:list xml:id="list1076092372" text:style-name="WWNum1">
        <text:list-item>
          <text:p text:style-name="P9"><text:span text:style-name="T3">Develop and customize </text:span><text:span text:style-name="T2">Board Support Packages (BSP) for embedded Linux</text:span><text:span text:style-name="T3"> systems. </text:span></text:p>
        </text:list-item>
        <text:list-item>
          <text:p text:style-name="P1"><text:span text:style-name="T3">Debug kernel-level issues including </text:span><text:span text:style-name="T2">boot failures, panics, and driver problems</text:span><text:span text:style-name="T3">. </text:span></text:p>
        </text:list-item>
        <text:list-item>
          <text:p text:style-name="P1"><text:span text:style-name="T3">Analyze system logs with </text:span><text:span text:style-name="T2">dmesg, ftrace</text:span><text:span text:style-name="T3">, and other debugging tools. </text:span></text:p>
        </text:list-item>
        <text:list-item>
          <text:p text:style-name="P1"><text:span text:style-name="T3">Configure Device Tree (DTS) for hardware bring-up and system integration. </text:span></text:p>
        </text:list-item>
        <text:list-item>
          <text:p text:style-name="P1"><text:span text:style-name="T3">Support </text:span><text:span text:style-name="T2">Linux kernel configuration, build, and version control</text:span><text:span text:style-name="T3"> for complex projects. </text:span></text:p>
        </text:list-item>
        <text:list-item>
          <text:p text:style-name="P1"><text:span text:style-name="T3">Collaborate with cross-functional teams to resolve runtime and integration issues. </text:span></text:p>
        </text:list-item>
        <text:list-item>
          <text:p text:style-name="P17"><text:span text:style-name="T3">Performed end-to-end </text:span><text:span text:style-name="T2">build &amp; integration (B&amp;I)</text:span><text:span text:style-name="T3"> of embedded Linux images using </text:span><text:span text:style-name="T2">Yocto/BitBake</text:span><text:span text:style-name="T3">, managing layer configurations, recipe customization, and cross-compilation toolchains for Toradex SoM and Raspberry Pi targets. </text:span></text:p>
        </text:list-item>
      </text:list>
      <text:p text:style-name="P8"><text:span text:style-name="T2">Embedded Firmware Engineer</text:span><text:span text:style-name="T3"><text:line-break/></text:span><text:span text:style-name="T2">ACZET Pvt. Ltd., Mumbai</text:span><text:span text:style-name="T3"> | Apr 2024 – Mar 2026</text:span></text:p>
      <text:list xml:id="list291868791" text:style-name="WWNum2">
        <text:list-item>
          <text:p text:style-name="P10"><text:span text:style-name="T3">Developed </text:span><text:span text:style-name="T2">real-time firmware and embedded Linux applications</text:span><text:span text:style-name="T3"> for industrial automation. </text:span></text:p>
        </text:list-item>
        <text:list-item>
          <text:p text:style-name="P2"><text:span text:style-name="T3">Implemented multi-threaded communication over </text:span><text:span text:style-name="T2">UART, I2C, SPI, CAN, USB, Bluetooth, Wi-Fi, GPIO</text:span><text:span text:style-name="T3">. </text:span></text:p>
        </text:list-item>
        <text:list-item>
          <text:p text:style-name="P2"><text:span text:style-name="T3">Developed applications in </text:span><text:span text:style-name="T2">C, Embedded C, Python, PyQt5</text:span><text:span text:style-name="T3"> for real-time system control. </text:span></text:p>
        </text:list-item>
        <text:list-item>
          <text:p text:style-name="P2"><text:span text:style-name="T3">Configured and customized </text:span><text:span text:style-name="T2">Yocto Linux</text:span><text:span text:style-name="T3"> for embedded deployments. </text:span></text:p>
        </text:list-item>
        <text:list-item>
          <text:p text:style-name="P2"><text:span text:style-name="T3">Troubleshot runtime, communication, and build issues across multiple platforms. </text:span></text:p>
        </text:list-item>
        <text:list-item>
          <text:p text:style-name="P18"><text:span text:style-name="T3">Conducted </text:span><text:span text:style-name="T2">software integration, debugging, and testing</text:span><text:span text:style-name="T3"> for multi-MCU systems. </text:span></text:p>
        </text:list-item>
      </text:list>
      <text:p text:style-name="Standard"><draw:rect text:anchor-type="as-char" style:rel-width="100%" draw:z-index="2" draw:style-name="gr1" draw:text-style-name="P25" svg:width="19.051cm" svg:height="0.054cm"><text:p/></draw:rect></text:p>
      <text:h text:style-name="P7" text:outline-level="2"><text:soft-page-break/><text:span text:style-name="T4">KEY PROJECTS</text:span></text:h>
      <text:p text:style-name="P8"><text:span text:style-name="T2">FORZA – Spot Laser Welding Machine Control Interface</text:span><text:span text:style-name="T3"><text:line-break/></text:span><text:span text:style-name="T5">Embedded Linux | Python | PyQt5 | UART | Bluetooth | OpenCV | USB</text:span></text:p>
      <text:list xml:id="list747757065" text:style-name="WWNum3">
        <text:list-item>
          <text:p text:style-name="P11"><text:span text:style-name="T3">Developed </text:span><text:span text:style-name="T2">multi-threaded embedded Linux GUI</text:span><text:span text:style-name="T3"> for Raspberry Pi with ~200 ms UART update cycles. </text:span></text:p>
        </text:list-item>
        <text:list-item>
          <text:p text:style-name="P3"><text:span text:style-name="T3">Controlled welding parameters: power, pulse time, frequency, and gas flow. </text:span></text:p>
        </text:list-item>
        <text:list-item>
          <text:p text:style-name="P3"><text:span text:style-name="T3">Integrated Bluetooth, live video streaming, and secure data storage using gocryptfs. </text:span></text:p>
        </text:list-item>
        <text:list-item>
          <text:p text:style-name="P19"><text:span text:style-name="T3">Configured </text:span><text:span text:style-name="T2">systemd services</text:span><text:span text:style-name="T3"> for automatic boot startup. </text:span></text:p>
        </text:list-item>
      </text:list>
      <text:p text:style-name="P8"><text:span text:style-name="T2">AXIOM – 3-Axis Metal Detection &amp; Purity Analysis (Firmware)</text:span><text:span text:style-name="T3"><text:line-break/></text:span><text:span text:style-name="T5">STM32 | Stepper Motors | UART | USB CDC | ADC</text:span></text:p>
      <text:list xml:id="list4087068377" text:style-name="WWNum4">
        <text:list-item>
          <text:p text:style-name="P12"><text:span text:style-name="T3">Developed </text:span><text:span text:style-name="T2">firmware for multi-axis stepper motor control</text:span><text:span text:style-name="T3"> with homing and safety features. </text:span></text:p>
        </text:list-item>
        <text:list-item>
          <text:p text:style-name="P4"><text:span text:style-name="T3">Implemented joystick-based manual control using ADC inputs. </text:span></text:p>
        </text:list-item>
        <text:list-item>
          <text:p text:style-name="P4"><text:span text:style-name="T3">Designed </text:span><text:span text:style-name="T2">multi-MCU UART communication</text:span><text:span text:style-name="T3"> between STM32F100, STM32F205, and Xia boards. </text:span></text:p>
        </text:list-item>
        <text:list-item>
          <text:p text:style-name="P20"><text:span text:style-name="T3">Enabled real-time PC communication via </text:span><text:span text:style-name="T2">USB CDC</text:span><text:span text:style-name="T3">. </text:span></text:p>
        </text:list-item>
      </text:list>
      <text:p text:style-name="P8"><text:span text:style-name="T2">AXIOM – Embedded Linux GUI Application</text:span><text:span text:style-name="T3"><text:line-break/></text:span><text:span text:style-name="T5">Qt 5.12 | Yocto | Toradex SoM</text:span></text:p>
      <text:list xml:id="list3987119891" text:style-name="WWNum5">
        <text:list-item>
          <text:p text:style-name="P13"><text:span text:style-name="T3">Built and configured Yocto Linux image for </text:span><text:span text:style-name="T2">embedded GUI deployment</text:span><text:span text:style-name="T3">. </text:span></text:p>
        </text:list-item>
        <text:list-item>
          <text:p text:style-name="P5"><text:span text:style-name="T3">Developed </text:span><text:span text:style-name="T2">Qt GUI modules for real-time parameter monitoring</text:span><text:span text:style-name="T3"> over UART. </text:span></text:p>
        </text:list-item>
        <text:list-item>
          <text:p text:style-name="P21"><text:span text:style-name="T3">Integrated joystick, Bluetooth, Wi-Fi, USB, and dual-camera live streaming for industrial control. </text:span></text:p>
        </text:list-item>
      </text:list>
      <text:p text:style-name="Standard"><draw:rect text:anchor-type="as-char" style:rel-width="100%" draw:z-index="3" draw:style-name="gr1" draw:text-style-name="P25" svg:width="19.051cm" svg:height="0.054cm"><text:p/></draw:rect></text:p>
      <text:h text:style-name="P7" text:outline-level="2"><text:span text:style-name="T4">EDUCATION</text:span></text:h>
      <text:list xml:id="list3651623704" text:style-name="WWNum8">
        <text:list-item>
          <text:p text:style-name="P14"><text:span text:style-name="T2">B.Tech (ECE)</text:span><text:span text:style-name="T3"> – Guru Nanak Institutions, JNTU Hyderabad </text:span></text:p>
        </text:list-item>
        <text:list-item>
          <text:p text:style-name="P22"><text:span text:style-name="T2">Diploma (ECE)</text:span><text:span text:style-name="T3"> – Sree Datha Institute, SBTET Hyderabad </text:span></text:p>
        </text:list-item>
      </text:list>
      <text:p text:style-name="Standard"><draw:rect text:anchor-type="as-char" style:rel-width="100%" draw:z-index="4" draw:style-name="gr1" draw:text-style-name="P25" svg:width="19.051cm" svg:height="0.054cm"><text:p/></draw:rect></text:p>
      <text:h text:style-name="P7" text:outline-level="2"><text:span text:style-name="T4">TECHNICAL SKILLS</text:span></text:h>
      <text:list xml:id="list3257293444" text:style-name="WWNum9">
        <text:list-item>
          <text:p text:style-name="P15"><text:span text:style-name="T2">Programming:</text:span><text:span text:style-name="T3"> C, Embedded C, C++, Python </text:span></text:p>
        </text:list-item>
        <text:list-item>
          <text:p text:style-name="P6"><text:span text:style-name="T2">Protocols:</text:span><text:span text:style-name="T3"> UART, I2C, SPI, CAN, USB, Bluetooth, Wi-Fi </text:span></text:p>
        </text:list-item>
        <text:list-item>
          <text:p text:style-name="P6"><text:span text:style-name="T2">OS / Frameworks:</text:span><text:span text:style-name="T3"> Embedded Linux, Yocto, Debian OS, PyQt5, Qt 5.12, QML </text:span></text:p>
        </text:list-item>
        <text:list-item>
          <text:p text:style-name="P6"><text:span text:style-name="T2">Hardware Platforms:</text:span><text:span text:style-name="T3"> STM32, Raspberry Pi, Toradex SoM, LPC, Arduino </text:span></text:p>
        </text:list-item>
        <text:list-item>
          <text:p text:style-name="P6"><text:span text:style-name="T2">Tools:</text:span><text:span text:style-name="T3"> Keil, STM32CubeMX, STM32 Programmer, Flash Magic, Git/Version Control </text:span></text:p>
        </text:list-item>
        <text:list-item>
          <text:p text:style-name="P23"><text:span text:style-name="T2">Other:</text:span><text:span text:style-name="T3"> Multi-threading, Multi-tasking, System Integration, Debugging &amp; Troubleshooting </text:span></text:p>
        </text:list-item>
      </text:list>
      <text:p text:style-name="Standard"><draw:rect text:anchor-type="as-char" style:rel-width="100%" draw:z-index="5" draw:style-name="gr1" draw:text-style-name="P25" svg:width="19.051cm" svg:height="0.054cm"><text:p/></draw:rec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F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F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name-complex="F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name-complex="F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fo:font-style="italic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Calibri Light" fo:font-family="'Calibri Light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aption" style:family="paragraph" style:parent-style-name="Standard" style:next-style-name="Standard" style:default-outline-level="">
      <style:text-properties fo:font-variant="small-caps" fo:color="#595959" fo:font-weight="bold" style:font-weight-asian="bold" style:font-weight-complex="bold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libri Light" fo:font-family="'Calibri Light'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Quote" style:family="paragraph" style:parent-style-name="Standard" style:next-style-name="Standard" style:default-outline-level="">
      <style:text-properties fo:font-style="italic" style:font-style-asian="italic" style:font-name-complex="F" style:font-family-generic-complex="system" style:font-pitch-complex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TOC_20_Heading" style:display-name="TOC Heading" style:family="paragraph" style:parent-style-name="Heading_20_1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name-complex="F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name-complex="F" style:font-family-generic-complex="system" style:font-pitch-complex="variable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name-complex="F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name-complex="F" style:font-family-generic-complex="system" style:font-pitch-complex="variable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libri Light" fo:font-family="'Calibri Light'" style:font-family-generic="roman" style:font-pitch="variable" fo:font-size="12pt" fo:font-style="italic" fo:font-weight="bold" style:font-name-asian="F" style:font-family-generic-asian="system" style:font-pitch-asian="variable" style:font-size-asian="12pt" style:font-style-asian="italic" style:font-weight-asian="bold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8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5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66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7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8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otarytech</meta:initial-creator>
    <meta:editing-cycles>2</meta:editing-cycles>
    <meta:creation-date>2026-03-31T17:09:00</meta:creation-date>
    <dc:date>2026-04-24T10:31:08.814223432</dc:date>
    <meta:editing-duration>PT8M12S</meta:editing-duration>
    <meta:generator>LibreOffice/6.4.7.2$Linux_X86_64 LibreOffice_project/40$Build-2</meta:generator>
    <meta:document-statistic meta:table-count="0" meta:image-count="0" meta:object-count="0" meta:page-count="2" meta:paragraph-count="51" meta:word-count="513" meta:character-count="3661" meta:non-whitespace-character-count="31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